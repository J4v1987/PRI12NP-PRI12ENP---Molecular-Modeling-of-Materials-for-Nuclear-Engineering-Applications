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ice_cub (64 H2O molecules).xs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t Parameters</text:p>
          </table:table-cell>
          <table:table-cell table:number-columns-repeated="3"/>
          <table:table-cell office:value-type="string" calcext:value-type="string">
            <text:p>End Paramet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tice Parameter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Lattice Parameter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.004" calcext:value-type="float">
            <text:p>9.004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.42" calcext:value-type="float">
            <text:p>12.42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.596" calcext:value-type="float">
            <text:p>15.596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2.42" calcext:value-type="float">
            <text:p>12.42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656" calcext:value-type="float">
            <text:p>14.656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42" calcext:value-type="float">
            <text:p>12.42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α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β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ɣ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ɣ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oms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oms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oms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oms</text:p>
          </table:table-cell>
        </table:table-row>
        <table:table-row table:style-name="ro1">
          <table:table-cell/>
          <table:table-cell office:value-type="string" calcext:value-type="string">
            <text:p>O molecular weight</text:p>
          </table:table-cell>
          <table:table-cell office:value-type="float" office:value="15.9994" calcext:value-type="float">
            <text:p>15.9994</text:p>
          </table:table-cell>
          <table:table-cell office:value-type="string" calcext:value-type="string">
            <text:p>g/mol</text:p>
          </table:table-cell>
          <table:table-cell/>
          <table:table-cell office:value-type="string" calcext:value-type="string">
            <text:p>O molecular weight</text:p>
          </table:table-cell>
          <table:table-cell office:value-type="float" office:value="15.9994" calcext:value-type="float">
            <text:p>15.9994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/>
          <table:table-cell office:value-type="string" calcext:value-type="string">
            <text:p>H molecular weight</text:p>
          </table:table-cell>
          <table:table-cell office:value-type="float" office:value="1.00794" calcext:value-type="float">
            <text:p>1.00794</text:p>
          </table:table-cell>
          <table:table-cell office:value-type="string" calcext:value-type="string">
            <text:p>g/mol</text:p>
          </table:table-cell>
          <table:table-cell/>
          <table:table-cell office:value-type="string" calcext:value-type="string">
            <text:p>H molecular weight</text:p>
          </table:table-cell>
          <table:table-cell office:value-type="float" office:value="1.00794" calcext:value-type="float">
            <text:p>1.00794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/>
          <table:table-cell office:value-type="string" calcext:value-type="string">
            <text:p>Avogadro’s nᵒ</text:p>
          </table:table-cell>
          <table:table-cell table:style-name="ce1" office:value-type="float" office:value="6.022E+023" calcext:value-type="float">
            <text:p>6.02E+23</text:p>
          </table:table-cell>
          <table:table-cell office:value-type="string" calcext:value-type="string">
            <text:p>mol⁻¹</text:p>
          </table:table-cell>
          <table:table-cell/>
          <table:table-cell office:value-type="string" calcext:value-type="string">
            <text:p>Avogadro’s nᵒ</text:p>
          </table:table-cell>
          <table:table-cell table:style-name="ce1" office:value-type="float" office:value="6.022E+023" calcext:value-type="float">
            <text:p>6.02E+23</text:p>
          </table:table-cell>
          <table:table-cell office:value-type="string" calcext:value-type="string">
            <text:p>mol⁻¹</text:p>
          </table:table-cell>
        </table:table-row>
        <table:table-row table:style-name="ro1">
          <table:table-cell/>
          <table:table-cell office:value-type="string" calcext:value-type="string">
            <text:p>O atomic weight</text:p>
          </table:table-cell>
          <table:table-cell table:style-name="ce1" table:formula="of:=[.C12]*(1/[.$C$14])" office:value-type="float" office:value="2.65682497509133E-023" calcext:value-type="float">
            <text:p>2.66E-23</text:p>
          </table:table-cell>
          <table:table-cell office:value-type="string" calcext:value-type="string">
            <text:p>g/atom</text:p>
          </table:table-cell>
          <table:table-cell/>
          <table:table-cell office:value-type="string" calcext:value-type="string">
            <text:p>O atomic weight</text:p>
          </table:table-cell>
          <table:table-cell table:style-name="ce1" table:formula="of:=[.G12]*(1/[.$C$14])" office:value-type="float" office:value="2.65682497509133E-023" calcext:value-type="float">
            <text:p>2.66E-23</text:p>
          </table:table-cell>
          <table:table-cell office:value-type="string" calcext:value-type="string">
            <text:p>g/atom</text:p>
          </table:table-cell>
        </table:table-row>
        <table:table-row table:style-name="ro1">
          <table:table-cell/>
          <table:table-cell office:value-type="string" calcext:value-type="string">
            <text:p>H atomic weight</text:p>
          </table:table-cell>
          <table:table-cell table:style-name="ce1" table:formula="of:=[.C13]*(1/[.$C$14])" office:value-type="float" office:value="1.67376286947858E-024" calcext:value-type="float">
            <text:p>1.67E-24</text:p>
          </table:table-cell>
          <table:table-cell office:value-type="string" calcext:value-type="string">
            <text:p>g/atom</text:p>
          </table:table-cell>
          <table:table-cell/>
          <table:table-cell office:value-type="string" calcext:value-type="string">
            <text:p>H atomic weight</text:p>
          </table:table-cell>
          <table:table-cell table:style-name="ce1" table:formula="of:=[.G13]*(1/[.$C$14])" office:value-type="float" office:value="1.67376286947858E-024" calcext:value-type="float">
            <text:p>1.67E-24</text:p>
          </table:table-cell>
          <table:table-cell office:value-type="string" calcext:value-type="string">
            <text:p>g/ato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4]*(0.00000001)" office:value-type="float" office:value="0.00000009004" calcext:value-type="float">
            <text:p>0.0000000900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a</text:p>
          </table:table-cell>
          <table:table-cell table:formula="of:=[.G4]*(0.00000001)" office:value-type="float" office:value="0.0000001242" calcext:value-type="float">
            <text:p>0.0000001242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5]*(0.00000001)" office:value-type="float" office:value="0.00000015596" calcext:value-type="float">
            <text:p>0.0000001559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b</text:p>
          </table:table-cell>
          <table:table-cell table:formula="of:=[.G5]*(0.00000001)" office:value-type="float" office:value="0.0000001242" calcext:value-type="float">
            <text:p>0.0000001242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6]*(0.00000001)" office:value-type="float" office:value="0.00000014656" calcext:value-type="float">
            <text:p>0.0000001465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</text:p>
          </table:table-cell>
          <table:table-cell table:formula="of:=[.G6]*(0.00000001)" office:value-type="float" office:value="0.0000001242" calcext:value-type="float">
            <text:p>0.0000001242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[.C18]*[.C19]*[.C20]" office:value-type="float" office:value="2.058089083904E-021" calcext:value-type="float">
            <text:p>2.058089083904E-21</text:p>
          </table:table-cell>
          <table:table-cell office:value-type="string" calcext:value-type="string">
            <text:p>cm³</text:p>
          </table:table-cell>
          <table:table-cell/>
          <table:table-cell office:value-type="string" calcext:value-type="string">
            <text:p>volume</text:p>
          </table:table-cell>
          <table:table-cell table:formula="of:=[.G18]*[.G19]*[.G20]" office:value-type="float" office:value="1.915864488E-021" calcext:value-type="float">
            <text:p>1.915864488E-21</text:p>
          </table:table-cell>
          <table:table-cell office:value-type="string" calcext:value-type="string">
            <text:p>cm³</text:p>
          </table:table-cell>
        </table:table-row>
        <table:table-row table:style-name="ro1">
          <table:table-cell/>
          <table:table-cell office:value-type="string" calcext:value-type="string">
            <text:p>total atomic weight</text:p>
          </table:table-cell>
          <table:table-cell table:formula="of:=([.C15]*[.C10])+([.C16]*[.C11])" office:value-type="float" office:value="1.91460963135171E-021" calcext:value-type="float">
            <text:p>1.91460963135171E-2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otal atomic weight</text:p>
          </table:table-cell>
          <table:table-cell table:formula="of:=([.G15]*[.G10])+([.G16]*[.G11])" office:value-type="float" office:value="1.91460963135171E-021" calcext:value-type="float">
            <text:p>1.91460963135171E-2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Initial density</text:p>
          </table:table-cell>
          <table:table-cell table:formula="of:=[.C22]/[.C21]" office:value-type="float" office:value="0.930285110749374" calcext:value-type="float">
            <text:p>0.930285110749374</text:p>
          </table:table-cell>
          <table:table-cell office:value-type="string" calcext:value-type="string">
            <text:p>g/cm³</text:p>
          </table:table-cell>
          <table:table-cell/>
          <table:table-cell office:value-type="string" calcext:value-type="string">
            <text:p>Final density</text:p>
          </table:table-cell>
          <table:table-cell table:formula="of:=[.G22]/[.G21]" office:value-type="float" office:value="0.999345018055217" calcext:value-type="float">
            <text:p>0.999345018055217</text:p>
          </table:table-cell>
          <table:table-cell office:value-type="string" calcext:value-type="string">
            <text:p>g/cm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5:42:16.531467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7:34:23.924563477</meta:creation-date>
    <dc:date>2026-05-07T18:57:21.345168761</dc:date>
    <meta:editing-duration>PT1H57M18S</meta:editing-duration>
    <meta:editing-cycles>19</meta:editing-cycles>
    <meta:generator>LibreOffice/25.8.5.2$Linux_X86_64 LibreOffice_project/580$Build-2</meta:generator>
    <meta:document-statistic meta:table-count="1" meta:cell-count="122" meta:object-count="0"/>
  </office:meta>
</office:document-meta>
</file>